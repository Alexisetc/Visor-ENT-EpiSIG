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iperv_237_nculo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2" style:family="table-cell" style:parent-style-name="Hiperv_237_nculo" style:data-style-name="N0">
      <style:table-cell-properties fo:border="thin solid #000000" style:vertical-align="middle" fo:wrap-option="wrap" fo:background-color="transparent"/>
      <style:text-properties fo:color="#000000" style:text-underline-style="solid" style:text-underline-type="single"/>
    </style:style>
    <style:style style:name="ce13" style:family="table-cell" style:parent-style-name="Hiperv_237_nculo" style:data-style-name="N0">
      <style:table-cell-properties fo:border="thin solid #000000" style:vertical-align="middle" fo:wrap-option="wrap" fo:background-color="transparent"/>
      <style:text-properties fo:color="#0000FF" style:text-underline-style="solid" style:text-underline-type="single"/>
    </style:style>
    <style:style style:name="ce14" style:family="table-cell" style:parent-style-name="Hiperv_237_nculo" style:data-style-name="N0">
      <style:table-cell-properties style:vertical-align="middle" fo:wrap-option="wrap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96.75pt" style:use-optimal-row-height="fals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EH_20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gresos_hospitalarios_2024.cs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5">
            <text:p>La base de datos de Egresos Hospitalarios está compuesta de 1.132.667 registros, que corresponden a morbilidad y mortalidad hospitalaria reportados por los establecimientos de salud que prestan internación hospitalaria en el año de estudio y de 38 variables. <text:s/>Para la recolección de la información se cuenta con el "Informe estadístico de Egresos Hospitalarios" (formularis), el mismo que es desarrollado en coordinación con el Ministerio de Salud Pública y el Instituto Ecuatoriano de Seguridad Social.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7">
            <text:p><text:a xlink:href="http://www.ecuadorencifras.gob.ec/">www.ecuadorencifras.gob.e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8">
            <text:p>CC-BY-4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echa de creación</text:p>
          </table:table-cell>
          <table:table-cell office:value-type="date" office:date-value="2025-06-09T00:00:00" table:style-name="ce10">
            <text:p>2025-06-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11">
            <text:p>Anu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4">
            <text:p>Registro Estadístico de Egresos Hospitalari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8">
            <text:p>S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Responsable</text:p>
          </table:table-cell>
          <table:table-cell office:value-type="string" table:style-name="ce12">
            <text:p><text:a xlink:href="mailto:patricia_brito@inec.gob.ec">patricia_brito@inec.gob.e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11">
            <text:p>Españ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8">
            <text:p>Salud, egresos hospitalarios, pacientes, morbilida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9">
            <text:p>URI</text:p>
          </table:table-cell>
          <table:table-cell office:value-type="string" table:style-name="ce13">
            <text:p>https://www.ecuadorencifras.gob.ec/camas-y-egresos-hospitalarios/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4"/>
          <table:table-cell table:number-columns-repeated="16382" table:style-name="ce1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INEC Gabriela Lugmaña</dc:creator>
    <meta:creation-date>2020-12-02T17:01:11Z</meta:creation-date>
    <dc:date>2025-06-19T20:53:28Z</dc:date>
  </office:meta>
</office:document-meta>
</file>